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1.164cm" fo:margin-right="1.164cm" fo:margin-top="0cm" fo:margin-bottom="0.423cm" style:contextual-spacing="false" style:line-height-at-least="0.741cm" fo:text-align="justify" style:justify-single-word="false" fo:orphans="2" fo:widows="2" fo:text-indent="0cm" style:auto-text-indent="false"/>
      <style:text-properties officeooo:paragraph-rsid="000d051e"/>
    </style:style>
    <style:style style:name="P2" style:family="paragraph" style:parent-style-name="Text_20_body">
      <style:paragraph-properties fo:margin-left="1.164cm" fo:margin-right="1.164cm" fo:margin-top="0cm" fo:margin-bottom="0.423cm" style:contextual-spacing="false" style:line-height-at-least="0.741cm" fo:text-align="justify" style:justify-single-word="false" fo:orphans="2" fo:widows="2" fo:text-indent="0cm" style:auto-text-indent="false"/>
      <style:text-properties style:font-name="Times New Roman" officeooo:paragraph-rsid="000d051e"/>
    </style:style>
    <style:style style:name="P3" style:family="paragraph" style:parent-style-name="Heading_20_3">
      <style:paragraph-properties fo:margin-left="1.164cm" fo:margin-right="1.164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officeooo:paragraph-rsid="000d0d68"/>
    </style:style>
    <style:style style:name="P4" style:family="paragraph" style:parent-style-name="Text_20_body" style:list-style-name="L1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officeooo:paragraph-rsid="000d0d68"/>
    </style:style>
    <style:style style:name="P5" style:family="paragraph" style:parent-style-name="Text_20_body" style:list-style-name="L1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  <style:text-properties officeooo:paragraph-rsid="000d0d68"/>
    </style:style>
    <style:style style:name="P6" style:family="paragraph" style:parent-style-name="Text_20_body" style:list-style-name="L1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officeooo:paragraph-rsid="000d0d68" loext:padding="0cm" loext:border="none"/>
    </style:style>
    <style:style style:name="P7" style:family="paragraph" style:parent-style-name="Heading_20_3">
      <style:paragraph-properties fo:margin-left="1.164cm" fo:margin-right="1.164cm" fo:margin-top="0.847cm" fo:margin-bottom="0.423cm" style:contextual-spacing="false" style:line-height-at-least="0.794cm" fo:text-align="justify" style:justify-single-word="false" fo:orphans="2" fo:widows="2" fo:text-indent="0cm" style:auto-text-indent="false"/>
    </style:style>
    <style:style style:name="P8" style:family="paragraph" style:parent-style-name="Text_20_body" style:list-style-name="L2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11" style:family="paragraph" style:parent-style-name="Text_20_body" style:list-style-name="L3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14" style:family="paragraph" style:parent-style-name="Text_20_body" style:list-style-name="L4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17" style:family="paragraph" style:parent-style-name="Text_20_body" style:list-style-name="L4">
      <style:paragraph-properties fo:margin-left="1.164cm" fo:margin-right="1.164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21" style:family="paragraph" style:parent-style-name="Text_20_body" style:list-style-name="L6">
      <style:paragraph-properties fo:margin-left="1.164cm" fo:margin-right="1.164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24" style:family="paragraph" style:parent-style-name="Text_20_body" style:list-style-name="L6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7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7">
      <style:paragraph-properties fo:margin-left="1.164cm" fo:margin-right="1.164cm" fo:margin-top="0cm" fo:margin-bottom="0.212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7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P28" style:family="paragraph" style:parent-style-name="Heading_20_2">
      <style:paragraph-properties fo:margin-left="1.164cm" fo:margin-right="1.164cm" fo:margin-top="0.847cm" fo:margin-bottom="0.423cm" style:contextual-spacing="false" style:line-height-at-least="0.847cm" fo:text-align="justify" style:justify-single-word="false" fo:orphans="2" fo:widows="2" fo:text-indent="0cm" style:auto-text-indent="false"/>
      <style:text-properties style:font-name="Times New Roman"/>
    </style:style>
    <style:style style:name="P29" style:family="paragraph" style:parent-style-name="Text_20_body">
      <style:paragraph-properties fo:margin-left="1.164cm" fo:margin-right="1.164cm" fo:margin-top="0.423cm" fo:margin-bottom="0.423cm" style:contextual-spacing="false" style:line-height-at-least="0.741cm" fo:text-align="justify" style:justify-single-word="false" fo:orphans="2" fo:widows="2" fo:text-indent="0cm" style:auto-text-indent="false"/>
    </style:style>
    <style:style style:name="P30" style:family="paragraph" style:parent-style-name="Text_20_body" style:list-style-name="L8">
      <style:paragraph-properties fo:margin-left="1.164cm" fo:margin-right="1.164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Times New Roman" fo:font-size="12pt" fo:letter-spacing="normal" fo:font-style="normal" fo:font-weight="normal" officeooo:rsid="000d051e" loext:padding="0cm" loext:border="none"/>
    </style:style>
    <style:style style:name="T2" style:family="text"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f1115" loext:opacity="100%" style:font-name="Times New Roman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f1115" loext:opacity="100%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f1115" loext:opacity="100%" fo:font-size="12pt" fo:letter-spacing="normal" fo:font-style="normal" fo:font-weight="normal" officeooo:rsid="000d051e" loext:padding="0cm" loext:border="none"/>
    </style:style>
    <style:style style:name="T6" style:family="text">
      <style:text-properties fo:font-variant="normal" fo:text-transform="none" fo:color="#0f1115" loext:opacity="100%" style:font-name="Times New Roman" fo:font-size="15pt" fo:letter-spacing="normal" fo:font-style="normal" fo:font-weight="bold" officeooo:rsid="000d0d68" loext:padding="0cm" loext:border="none"/>
    </style:style>
    <style:style style:name="T7" style:family="text">
      <style:text-properties fo:font-variant="normal" fo:text-transform="none" fo:color="#0f1115" loext:opacity="100%" style:font-name="Times New Roman" fo:font-size="1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0f1115" loext:opacity="100%" style:font-name="Times New Roman" fo:font-size="15pt" fo:letter-spacing="normal" fo:font-style="normal" fo:font-weight="bold" fo:background-color="#ebeef2" loext:char-shading-value="0" loext:padding="0cm" loext:border="none"/>
    </style:style>
    <style:style style:name="T9" style:family="text">
      <style:text-properties style:font-name="Times New Roman" fo:font-weight="bold"/>
    </style:style>
    <style:style style:name="T10" style:family="text">
      <style:text-properties style:font-name="Times New Roman"/>
    </style:style>
    <style:style style:name="T11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cm" loext:border="none"/>
    </style:style>
    <style:style style:name="T12" style:family="text">
      <style:text-properties fo:font-variant="normal" fo:text-transform="none" fo:color="#0f1115" loext:opacity="100%" fo:font-size="16.5pt" fo:letter-spacing="normal" fo:font-style="normal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</text:span><text:span text:style-name="T2">s testes de bancada realizados </text:span><text:span text:style-name="Strong_20_Emphasis"><text:span text:style-name="T3">validam </text:span></text:span><text:span text:style-name="T2">o comportamento do site, pois cobrem uma ampla gama de cenários de uso real, desde o fluxo ideal até situações de erro, uso de ferramentas e entradas “sujas”.</text:span></text:p>
      <text:p text:style-name="P2"><text:span text:style-name="T4">A seguir, </text:span><text:span text:style-name="T5">a análise de</text:span><text:span text:style-name="T4"> cada um dos sete relatórios gerados, destacando o que cada teste validou e se o sistema se comportou conforme o esperado:</text:span></text:p>
      <text:h text:style-name="P3" text:outline-level="3"><text:span text:style-name="T6">1</text:span><text:span text:style-name="T7">. </text:span><text:span text:style-name="Source_20_Text"><text:span text:style-name="T8">Relatorio_Pitagorica_Teste_de_Bancada_acertando_tudo_sem_pedir_dicas_e_sem_usar_calculadora.txt</text:span></text:span></text:h>
      <text:list text:style-name="L1">
        <text:list-item>
          <text:p text:style-name="P4"><text:span text:style-name="Strong_20_Emphasis"><text:span text:style-name="T3">Perfil</text:span></text:span><text:span text:style-name="T2">: Aluno que acerta tudo </text:span><text:span text:style-name="Strong_20_Emphasis"><text:span text:style-name="T3">sem dicas e sem calculadora</text:span></text:span><text:span text:style-name="T2"> – fluxo mais rápido.</text:span></text:p>
        </text:list-item>
        <text:list-item>
          <text:p text:style-name="P5"><text:span text:style-name="Strong_20_Emphasis"><text:span text:style-name="T3">O que valida</text:span></text:span><text:span text:style-name="T2">:</text:span></text:p>
          <text:list>
            <text:list-item>
              <text:p text:style-name="P6">O sistema funciona independentemente do uso de ferramentas.</text:p>
            </text:list-item>
            <text:list-item>
              <text:p text:style-name="P6">O registro de uso da calculadora fica como “Não” e o de dicas como 0.</text:p>
            </text:list-item>
            <text:list-item>
              <text:p text:style-name="P6">Tempo total menor, condizente com o perfil.</text:p>
            </text:list-item>
          </text:list>
        </text:list-item>
        <text:list-item>
          <text:p text:style-name="P4"><text:span text:style-name="Strong_20_Emphasis"><text:span text:style-name="T9">Resultado</text:span></text:span><text:span text:style-name="T10">: ✅ O fluxo básico está íntegro e a ausência de interações extras é refletida corretamente no relatório.</text:span></text:p>
        </text:list-item>
      </text:list>
      <text:h text:style-name="P7" text:outline-level="3"><text:span text:style-name="T6">2</text:span><text:span text:style-name="T7">. </text:span><text:span text:style-name="Source_20_Text"><text:span text:style-name="T8">Relatorio_Pitagorica_Teste_de_Bancada_acertando_tudo_sem_pedir_dicas_e_usando_calculadora.txt</text:span></text:span></text:h>
      <text:list text:style-name="L2">
        <text:list-item>
          <text:p text:style-name="P8"><text:span text:style-name="Strong_20_Emphasis"><text:span text:style-name="T3">Perfil</text:span></text:span><text:span text:style-name="T2">: Aluno que acerta todas as respostas de primeira, sem dicas, mas usando a calculadora em vários passos.</text:span></text:p>
        </text:list-item>
        <text:list-item>
          <text:p text:style-name="P9"><text:span text:style-name="Strong_20_Emphasis"><text:span text:style-name="T3">O que valida</text:span></text:span><text:span text:style-name="T2">:</text:span></text:p>
          <text:list>
            <text:list-item>
              <text:p text:style-name="P10">Validação de respostas corretas (exatas, numéricas e flexíveis).</text:p>
            </text:list-item>
            <text:list-item>
              <text:p text:style-name="P10">Registro correto do uso da calculadora (abertura, operações, exportação do resultado).</text:p>
            </text:list-item>
            <text:list-item>
              <text:p text:style-name="P10">Fluxo de fases e progressão sem travamentos.</text:p>
            </text:list-item>
            <text:list-item>
              <text:p text:style-name="P10">Tempos de resposta curtos e logs claros.</text:p>
            </text:list-item>
          </text:list>
        </text:list-item>
        <text:list-item>
          <text:p text:style-name="P8"><text:span text:style-name="Strong_20_Emphasis"><text:span text:style-name="T3">Resultado</text:span></text:span><text:span text:style-name="T2">: ✅ O site funcionou perfeitamente, todos os passos foram concluídos e o relatório refletiu o desempenho.</text:span></text:p>
        </text:list-item>
      </text:list>
      <text:h text:style-name="P7" text:outline-level="3"><text:soft-page-break/><text:span text:style-name="T6">3</text:span><text:span text:style-name="T7">. </text:span><text:span text:style-name="Source_20_Text"><text:span text:style-name="T8">Relatorio_Pitagorica_Teste_de_Bancada_acertando_tudo_pedindo_todas_as_dicas_e_usando_calculadora.txt</text:span></text:span></text:h>
      <text:list text:style-name="L3">
        <text:list-item>
          <text:p text:style-name="P11"><text:span text:style-name="Strong_20_Emphasis"><text:span text:style-name="T3">Perfil</text:span></text:span><text:span text:style-name="T2">: Aluno que pede </text:span><text:span text:style-name="Strong_20_Emphasis"><text:span text:style-name="T3">todas as dicas</text:span></text:span><text:span text:style-name="T2"> disponíveis (45) e também usa a calculadora.</text:span></text:p>
        </text:list-item>
        <text:list-item>
          <text:p text:style-name="P12"><text:span text:style-name="Strong_20_Emphasis"><text:span text:style-name="T3">O que valida</text:span></text:span><text:span text:style-name="T2">:</text:span></text:p>
          <text:list>
            <text:list-item>
              <text:p text:style-name="P13">Exibição e registro das dicas (cada passo recebeu a dica correta).</text:p>
            </text:list-item>
            <text:list-item>
              <text:p text:style-name="P13">A dica não impede o uso da calculadora – ambos são registrados.</text:p>
            </text:list-item>
            <text:list-item>
              <text:p text:style-name="P13">O sistema permite múltiplas interações (dica + calculadora + resposta) sem conflitos.</text:p>
            </text:list-item>
            <text:list-item>
              <text:p text:style-name="P13">O relatório inclui o texto exato da dica e o momento em que foi solicitada.</text:p>
            </text:list-item>
          </text:list>
        </text:list-item>
        <text:list-item>
          <text:p text:style-name="P11"><text:span text:style-name="Strong_20_Emphasis"><text:span text:style-name="T3">Resultado</text:span></text:span><text:span text:style-name="T2">: ✅ Todas as dicas foram apresentadas e registradas, demonstrando robustez no gerenciamento de eventos.</text:span></text:p>
        </text:list-item>
      </text:list>
      <text:h text:style-name="P7" text:outline-level="3"><text:span text:style-name="T6">4</text:span><text:span text:style-name="T7">. </text:span><text:span text:style-name="Source_20_Text"><text:span text:style-name="T8">Relatorio_Pitagorica_Teste_de_Bancada_errando_tudo_uma_vez.txt</text:span></text:span></text:h>
      <text:list text:style-name="L4">
        <text:list-item>
          <text:p text:style-name="P14"><text:span text:style-name="Strong_20_Emphasis"><text:span text:style-name="T3">Perfil</text:span></text:span><text:span text:style-name="T2">: Aluno que erra </text:span><text:span text:style-name="Strong_20_Emphasis"><text:span text:style-name="T3">exatamente uma vez</text:span></text:span><text:span text:style-name="T2"> em cada passo e depois acerta.</text:span></text:p>
        </text:list-item>
        <text:list-item>
          <text:p text:style-name="P15"><text:span text:style-name="Strong_20_Emphasis"><text:span text:style-name="T3">O que valida</text:span></text:span><text:span text:style-name="T2">:</text:span></text:p>
          <text:list>
            <text:list-item>
              <text:p text:style-name="P16">Contagem de erros por passo (cada passo registra 1 erro).</text:p>
            </text:list-item>
            <text:list-item>
              <text:p text:style-name="P17"><text:span text:style-name="T2">Mensagens de erro adequadas e feedback visual (classe </text:span><text:span text:style-name="Source_20_Text"><text:span text:style-name="T11">error-text</text:span></text:span><text:span text:style-name="T2">).</text:span></text:p>
            </text:list-item>
            <text:list-item>
              <text:p text:style-name="P16">Possibilidade de tentar novamente e, após acertar, o campo é desabilitado e o progresso avança.</text:p>
            </text:list-item>
            <text:list-item>
              <text:p text:style-name="P16">O relatório destaca o “ponto crítico” (Fase 1, Passo 1) como o primeiro erro.</text:p>
            </text:list-item>
          </text:list>
        </text:list-item>
        <text:list-item>
          <text:p text:style-name="P14"><text:span text:style-name="Strong_20_Emphasis"><text:span text:style-name="T3">Resultado</text:span></text:span><text:span text:style-name="T2">: ✅ O sistema registrou todas as tentativas erradas e permitiu a correção, exatamente como projetado.</text:span></text:p>
        </text:list-item>
      </text:list>
      <text:h text:style-name="P7" text:outline-level="3"><text:span text:style-name="T6">5</text:span><text:span text:style-name="T7">. </text:span><text:span text:style-name="Source_20_Text"><text:span text:style-name="T8">Relatorio_Pitagorica_Teste_Caótico_Completo.txt</text:span></text:span></text:h>
      <text:list text:style-name="L5">
        <text:list-item>
          <text:p text:style-name="P18"><text:span text:style-name="Strong_20_Emphasis"><text:span text:style-name="T3">Perfil</text:span></text:span><text:span text:style-name="T2">: Aluno que </text:span><text:span text:style-name="Strong_20_Emphasis"><text:span text:style-name="T3">erra várias vezes</text:span></text:span><text:span text:style-name="T2"> por passo, pede </text:span><text:span text:style-name="Strong_20_Emphasis"><text:span text:style-name="T3">todas as dicas</text:span></text:span><text:span text:style-name="T2"> e usa calculadora de forma intensiva (cenário de maior dificuldade).</text:span></text:p>
        </text:list-item>
        <text:list-item>
          <text:p text:style-name="P19"><text:span text:style-name="Strong_20_Emphasis"><text:span text:style-name="T3">O que valida</text:span></text:span><text:span text:style-name="T2">:</text:span></text:p>
          <text:list>
            <text:list-item>
              <text:p text:style-name="P20">Suporte a múltiplos erros (alguns passos chegam a 3 erros).</text:p>
            </text:list-item>
            <text:list-item>
              <text:p text:style-name="P20">Combinação simultânea de dicas, calculadora e múltiplas tentativas.</text:p>
            </text:list-item>
            <text:list-item>
              <text:p text:style-name="P20">O log cronológico mostra todas as ações na ordem correta.</text:p>
            </text:list-item>
            <text:list-item>
              <text:p text:style-name="P20"><text:soft-page-break/>O tempo total é maior, e o relatório aponta o ponto com mais erros (Fase 2, Passo 4 com 3 erros).</text:p>
            </text:list-item>
          </text:list>
        </text:list-item>
        <text:list-item>
          <text:p text:style-name="P18"><text:span text:style-name="Strong_20_Emphasis"><text:span text:style-name="T3">Resultado</text:span></text:span><text:span text:style-name="T2">: ✅ O sistema manteve consistência mesmo sob estresse, sem perder informações ou travar.</text:span></text:p>
        </text:list-item>
      </text:list>
      <text:h text:style-name="P7" text:outline-level="3"><text:span text:style-name="T6">6</text:span><text:span text:style-name="T7">. </text:span><text:span text:style-name="Source_20_Text"><text:span text:style-name="T8">Relatorio_Pitagorica_Teste_das_Respostas_Sujas.txt</text:span></text:span></text:h>
      <text:list text:style-name="L6">
        <text:list-item>
          <text:p text:style-name="P21"><text:span text:style-name="Strong_20_Emphasis"><text:span text:style-name="T3">Perfil</text:span></text:span><text:span text:style-name="T2">: Aluno que digita respostas com </text:span><text:span text:style-name="Strong_20_Emphasis"><text:span text:style-name="T3">espaços extras, maiúsculas/minúsculas misturadas, acentos e até pequenos typos</text:span></text:span><text:span text:style-name="T2"> (ex.: </text:span><text:span text:style-name="Source_20_Text"><text:span text:style-name="T11">HIPoTeNuSa</text:span></text:span><text:span text:style-name="T2">, </text:span><text:span text:style-name="Source_20_Text"><text:span text:style-name="T11">Diâmetro</text:span></text:span><text:span text:style-name="T2">, </text:span><text:span text:style-name="Source_20_Text"><text:span text:style-name="T11">6raiz5</text:span></text:span><text:span text:style-name="T2">).</text:span></text:p>
        </text:list-item>
        <text:list-item>
          <text:p text:style-name="P22"><text:span text:style-name="Strong_20_Emphasis"><text:span text:style-name="T3">O que valida</text:span></text:span><text:span text:style-name="T2">:</text:span></text:p>
          <text:list>
            <text:list-item>
              <text:p text:style-name="P23">Normalização de texto (remoção de acentos, espaços, lower case) para comparações flexíveis.</text:p>
            </text:list-item>
            <text:list-item>
              <text:p text:style-name="P21"><text:span text:style-name="T2">Uso da distância de Levenshtein para aceitar variações como </text:span><text:span text:style-name="Source_20_Text"><text:span text:style-name="T11">catetos</text:span></text:span><text:span text:style-name="T2"> vs </text:span><text:span text:style-name="Source_20_Text"><text:span text:style-name="T11">cateto</text:span></text:span><text:span text:style-name="T2">, etc.</text:span></text:p>
            </text:list-item>
            <text:list-item>
              <text:p text:style-name="P23">Aceitação de valores numéricos com espaços ou pontos.</text:p>
            </text:list-item>
            <text:list-item>
              <text:p text:style-name="P23">Todas as respostas foram aceitas na primeira tentativa.</text:p>
            </text:list-item>
          </text:list>
        </text:list-item>
        <text:list-item>
          <text:p text:style-name="P24"><text:span text:style-name="Strong_20_Emphasis"><text:span text:style-name="T3">Resultado</text:span></text:span><text:span text:style-name="T2">: ✅ O sistema é tolerante a entradas imperfeitas, como esperado de uma interface educacional amigável.</text:span></text:p>
        </text:list-item>
      </text:list>
      <text:h text:style-name="P7" text:outline-level="3"><text:span text:style-name="T6">7</text:span><text:span text:style-name="T7">. </text:span><text:span text:style-name="Source_20_Text"><text:span text:style-name="T8">Relatorio_Pitagorica_Teste_do_Spammer_Cliques_no_Vazio.txt</text:span></text:span></text:h>
      <text:list text:style-name="L7">
        <text:list-item>
          <text:p text:style-name="P25"><text:span text:style-name="Strong_20_Emphasis"><text:span text:style-name="T3">Perfil</text:span></text:span><text:span text:style-name="T2">: Aluno que </text:span><text:span text:style-name="Strong_20_Emphasis"><text:span text:style-name="T3">clicou repetidamente nos botões de validação sem preencher os campos</text:span></text:span><text:span text:style-name="T2"> (spam de cliques).</text:span></text:p>
        </text:list-item>
        <text:list-item>
          <text:p text:style-name="P26"><text:span text:style-name="Strong_20_Emphasis"><text:span text:style-name="T3">O que valida</text:span></text:span><text:span text:style-name="T2">:</text:span></text:p>
          <text:list>
            <text:list-item>
              <text:p text:style-name="P27">Validação de campos vazios: o sistema impede a validação e exibe mensagem de aviso (não registra erros nem avança).</text:p>
            </text:list-item>
            <text:list-item>
              <text:p text:style-name="P27">Os logs mostram apenas os acertos após o preenchimento, sem registro de tentativas vazias (o que indica que o bloqueio funcionou).</text:p>
            </text:list-item>
            <text:list-item>
              <text:p text:style-name="P27">A interface não quebra com cliques excessivos.</text:p>
            </text:list-item>
          </text:list>
        </text:list-item>
        <text:list-item>
          <text:p text:style-name="P25"><text:span text:style-name="Strong_20_Emphasis"><text:span text:style-name="T3">Resultado</text:span></text:span><text:span text:style-name="T2">: ✅ O sistema tratou corretamente entradas vazias, mantendo a estabilidade.</text:span></text:p>
        </text:list-item>
      </text:list>
      <text:h text:style-name="P28" text:outline-level="2"><text:soft-page-break/><text:span text:style-name="T12">Conclusão Geral</text:span></text:h>
      <text:p text:style-name="P29"><text:span text:style-name="T2">Os testes de bancada </text:span><text:span text:style-name="Strong_20_Emphasis"><text:span text:style-name="T3">validam plenamente</text:span></text:span><text:span text:style-name="T2"> o site, pois:</text:span></text:p>
      <text:list text:style-name="L8">
        <text:list-item>
          <text:p text:style-name="P30"><text:span text:style-name="Strong_20_Emphasis"><text:span text:style-name="T3">Cobrem todos os principais caminhos</text:span></text:span><text:span text:style-name="T2"> (sucesso, erro, dicas, calculadora, entradas mal formatadas, spam).</text:span></text:p>
        </text:list-item>
        <text:list-item>
          <text:p text:style-name="P30"><text:span text:style-name="Strong_20_Emphasis"><text:span text:style-name="T3">Os logs gerados são coerentes</text:span></text:span><text:span text:style-name="T2"> com cada ação, comprovando que o motor de validação, o sistema de dicas, a calculadora e o gerador de relatório funcionam em conjunto.</text:span></text:p>
        </text:list-item>
        <text:list-item>
          <text:p text:style-name="P30"><text:span text:style-name="Strong_20_Emphasis"><text:span text:style-name="T3">Não houve falhas</text:span></text:span><text:span text:style-name="T2"> em nenhum dos cenários – todos os passos foram concluídos com êxito e os relatórios refletem o comportamento esper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2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6:53:21.917853200</meta:creation-date>
    <meta:generator>LibreOffice/26.2.1.2$Windows_X86_64 LibreOffice_project/620$Build-2</meta:generator>
    <dc:date>2026-07-02T17:17:53.083461500</dc:date>
    <meta:editing-duration>PT13M50S</meta:editing-duration>
    <meta:editing-cycles>1</meta:editing-cycles>
    <meta:document-statistic meta:table-count="0" meta:image-count="0" meta:object-count="0" meta:page-count="4" meta:paragraph-count="61" meta:word-count="737" meta:character-count="4798" meta:non-whitespace-character-count="4169"/>
  </office:meta>
</office:document-meta>
</file>